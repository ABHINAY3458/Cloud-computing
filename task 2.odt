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4700000264C4150903.png" manifest:media-type="image/png"/>
  <manifest:file-entry manifest:full-path="Pictures/100000010000053600000256F5F230CA.png" manifest:media-type="image/png"/>
  <manifest:file-entry manifest:full-path="Pictures/10000001000005460000027746FB88E9.png" manifest:media-type="image/png"/>
  <manifest:file-entry manifest:full-path="Pictures/100000010000054A000002679967C369.png" manifest:media-type="image/png"/>
  <manifest:file-entry manifest:full-path="Pictures/100000010000054A0000022AD1EA9E42.png" manifest:media-type="image/png"/>
  <manifest:file-entry manifest:full-path="Pictures/10000001000005540000020CBC780CD8.png" manifest:media-type="image/png"/>
  <manifest:file-entry manifest:full-path="Pictures/10000001000005280000025850C82A2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left" style:justify-single-word="false" style:writing-mode="lr-tb" style:writing-mode-automatic="false"/>
      <style:text-properties officeooo:paragraph-rsid="000cb938"/>
    </style:style>
    <style:style style:name="P2" style:family="paragraph">
      <style:paragraph-properties fo:text-align="center"/>
    </style:style>
    <style:style style:name="P3" style:family="paragraph" style:parent-style-name="Heading_20_2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ize="15pt" fo:font-weight="normal" officeooo:paragraph-rsid="000d535b" style:font-size-asian="15pt" style:font-weight-asian="normal" style:font-size-complex="15pt" style:font-weight-complex="normal"/>
    </style:style>
    <style:style style:name="P5" style:family="paragraph" style:parent-style-name="Text_20_body" style:list-style-name="L1"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Horizontal_20_Line"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fo:font-size="15pt" fo:font-weight="normal" officeooo:rsid="000d535b" officeooo:paragraph-rsid="000d535b" style:font-size-asian="15pt" style:font-weight-asian="normal" style:font-size-complex="15pt" style:font-weight-complex="normal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font-size="15pt" fo:font-weight="normal" officeooo:paragraph-rsid="000d535b" style:font-size-asian="15pt" style:font-weight-asian="normal" style:font-size-complex="15pt" style:font-weight-complex="normal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Text_20_body" style:list-style-name="L2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fo:font-size="15pt" fo:font-weight="normal" officeooo:paragraph-rsid="000d535b" style:font-size-asian="15pt" style:font-weight-asian="normal" style:font-size-complex="15pt" style:font-weight-complex="normal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font-size="15pt" fo:font-weight="normal" officeooo:paragraph-rsid="0010c422" style:font-size-asian="15pt" style:font-weight-asian="normal" style:font-size-complex="15pt" style:font-weight-complex="normal"/>
    </style:style>
    <style:style style:name="P13" style:family="paragraph" style:parent-style-name="Text_20_body" style:list-style-name="L3">
      <style:text-properties fo:font-size="15pt" fo:font-weight="normal" officeooo:paragraph-rsid="0010c422" style:font-size-asian="15pt" style:font-weight-asian="normal" style:font-size-complex="15pt" style:font-weight-complex="normal"/>
    </style:style>
    <style:style style:name="P14" style:family="paragraph" style:parent-style-name="Heading_20_1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Text_20_body" style:list-style-name="L4"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Text_20_body" style:list-style-name="L5"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 style:parent-style-name="Heading_20_3">
      <style:text-properties fo:font-size="15pt" fo:font-weight="bold" style:font-size-asian="15pt" style:font-weight-asian="bold" style:font-size-complex="15pt" style:font-weight-complex="bold"/>
    </style:style>
    <style:style style:name="P21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Text_20_body" style:list-style-name="L6"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 style:parent-style-name="Heading_20_3">
      <style:text-properties fo:font-size="15pt" fo:font-weight="normal" style:font-size-asian="15pt" style:font-weight-asian="normal" style:font-size-complex="15pt" style:font-weight-complex="normal"/>
    </style:style>
    <style:style style:name="P25" style:family="paragraph" style:parent-style-name="Text_20_body" style:list-style-name="L7">
      <style:paragraph-properties fo:margin-top="0cm" fo:margin-bottom="0cm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 style:parent-style-name="Text_20_body" style:list-style-name="L7">
      <style:text-properties fo:font-size="15pt" fo:font-weight="normal" style:font-size-asian="15pt" style:font-weight-asian="normal" style:font-size-complex="15pt" style:font-weight-complex="normal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28" style:family="paragraph" style:parent-style-name="Text_20_body" style:list-style-name="L8">
      <style:text-properties fo:font-size="15pt" fo:font-weight="normal" style:font-size-asian="15pt" style:font-weight-asian="normal" style:font-size-complex="15pt" style:font-weight-complex="normal"/>
    </style:style>
    <style:style style:name="P29" style:family="paragraph" style:parent-style-name="Text_20_body" style:list-style-name="L9">
      <style:paragraph-properties fo:margin-top="0cm" fo:margin-bottom="0cm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30" style:family="paragraph" style:parent-style-name="Text_20_body" style:list-style-name="L9">
      <style:text-properties fo:font-size="15pt" fo:font-weight="normal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left" style:justify-single-word="false"/>
      <style:text-properties officeooo:paragraph-rsid="000d535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8pt" fo:font-weight="bold" officeooo:rsid="000cb938" style:font-size-asian="28pt" style:font-weight-asian="bold" style:font-size-complex="28pt" style:font-weight-complex="bold"/>
    </style:style>
    <style:style style:name="T4" style:family="text">
      <style:text-properties fo:font-size="15pt" fo:font-weight="normal" officeooo:rsid="00153536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bold" officeooo:rsid="00153536" style:font-size-asian="13.1000003814697pt" style:font-weight-asian="bold" style:font-size-complex="15pt" style:font-weight-complex="bold"/>
    </style:style>
    <style:style style:name="T6" style:family="text">
      <style:text-properties fo:font-size="20pt" fo:font-weight="bold" officeooo:rsid="00153536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Horizontal line 1" draw:style-name="gr1" draw:text-style-name="P2" svg:x1="7.151cm" svg:y1="2.181cm" svg:x2="27.868cm" svg:y2="2.242cm"><text:p/></draw:line><text:span text:style-name="T1"><text:line-break/></text:span><text:span text:style-name="T2">CLOUD STORAGE IMPLEMENTATION </text:span><text:span text:style-name="T1"><text:line-break/><text:line-break/></text:span><text:span text:style-name="T3">AWS S3 :<text:line-break/></text:span><text:span text:style-name="T4">It is a cloud <text:s/>storage service provided that can store any amount of data from anywhere.<text:line-break/><text:line-break/></text:span><text:span text:style-name="T5">Example:<text:line-break/></text:span><text:span text:style-name="T4">Store Files, Backup Data, Host Website, Store image/vedioes, Save application data</text:span><text:span text:style-name="T1"><text:line-break/><text:line-break/></text:span><text:span text:style-name="T6">How to store data in S3:</text:span><text:span text:style-name="T1"><text:line-break/></text:span></text:p>
      <text:h text:style-name="P3" text:outline-level="2">🔹 <text:span text:style-name="T7">Step 1: Open AWS S3 Service</text:span></text:h>
      <text:list text:style-name="L1">
        <text:list-item>
          <text:p text:style-name="P4">Logged into AWS Management Console </text:p>
        </text:list-item>
        <text:list-item>
          <text:p text:style-name="P4">Searched for <text:span text:style-name="Strong_20_Emphasis"><text:span text:style-name="T8">S3</text:span></text:span> in the services search bar </text:p>
        </text:list-item>
        <text:list-item>
          <text:p text:style-name="P5">Opened the Amazon S3 dashboard <text:line-break/><text:line-break/><text:line-break/><draw:frame draw:style-name="fr1" draw:name="Image1" text:anchor-type="char" svg:x="0.693cm" svg:y="1.799cm" svg:width="16.249cm" svg:height="7.594cm" draw:z-index="1"><draw:image xlink:href="Pictures/10000001000005460000027746FB88E9.png" xlink:type="simple" xlink:show="embed" xlink:actuate="onLoad" draw:mime-type="image/png"/></draw:frame></text:p>
        </text:list-item>
      </text:list>
      <text:p text:style-name="P6"/>
      <text:h text:style-name="P3" text:outline-level="2"><text:soft-page-break/>🔹 <text:span text:style-name="T9">Step 2: Create Storage Bucket</text:span></text:h>
      <text:list text:style-name="L2">
        <text:list-item>
          <text:p text:style-name="P7">Clicked Creat Bucket</text:p>
        </text:list-item>
        <text:list-item>
          <text:p text:style-name="P8">Entered unique bucket name </text:p>
        </text:list-item>
        <text:list-item>
          <text:p text:style-name="P9">Selected region </text:p>
        </text:list-item>
        <text:list-item>
          <text:p text:style-name="P10">Kept default settings </text:p>
        </text:list-item>
      </text:list>
      <text:p text:style-name="P6"><text:line-break/><text:line-break/><draw:frame draw:style-name="fr2" draw:name="Image2" text:anchor-type="char" svg:width="17cm" svg:height="7.62cm" draw:z-index="2"><draw:image xlink:href="Pictures/100000010000053600000256F5F230CA.png" xlink:type="simple" xlink:show="embed" xlink:actuate="onLoad" draw:mime-type="image/png"/></draw:frame></text:p>
      <text:h text:style-name="P3" text:outline-level="2">🔹 <text:span text:style-name="T7">Step 3: Upload Files</text:span></text:h>
      <text:list text:style-name="L3">
        <text:list-item>
          <text:p text:style-name="P11">Opened the created bucket </text:p>
        </text:list-item>
        <text:list-item>
          <text:p text:style-name="P11">Clicked <text:span text:style-name="Strong_20_Emphasis"><text:span text:style-name="T8">Upload</text:span></text:span> </text:p>
        </text:list-item>
        <text:list-item>
          <text:p text:style-name="P12">Selected files from local system </text:p>
        </text:list-item>
        <text:list-item>
          <text:p text:style-name="P13">Successfully uploaded files to S3 bucket<text:line-break/><text:line-break/><draw:frame draw:style-name="fr1" draw:name="Image3" text:anchor-type="char" svg:x="0.376cm" svg:y="2.138cm" svg:width="16.249cm" svg:height="6.609cm" draw:z-index="3"><draw:image xlink:href="Pictures/100000010000054A000002679967C369.png" xlink:type="simple" xlink:show="embed" xlink:actuate="onLoad" draw:mime-type="image/png"/></draw:frame></text:p>
        </text:list-item>
      </text:list>
      <text:p text:style-name="P6"><text:soft-page-break/></text:p>
      <text:h text:style-name="P14" text:outline-level="1">🔒 <text:span text:style-name="T7">Public vs Private Access</text:span></text:h>
      <text:h text:style-name="P15" text:outline-level="2">Public Access</text:h>
      <text:list text:style-name="L4">
        <text:list-item>
          <text:p text:style-name="P16">Files can be accessed by anyone using a URL </text:p>
        </text:list-item>
        <text:list-item>
          <text:p text:style-name="P16">Useful for: </text:p>
          <text:list>
            <text:list-item>
              <text:p text:style-name="P16">Website images </text:p>
            </text:list-item>
            <text:list-item>
              <text:p text:style-name="P17">Public downloads </text:p>
            </text:list-item>
          </text:list>
        </text:list-item>
      </text:list>
      <text:h text:style-name="P15" text:outline-level="2">Private Access</text:h>
      <text:list text:style-name="L5">
        <text:list-item>
          <text:p text:style-name="P18">Files accessible only to authorized users </text:p>
        </text:list-item>
        <text:list-item>
          <text:p text:style-name="P19">More secure for sensitive data </text:p>
        </text:list-item>
      </text:list>
      <text:h text:style-name="P20" text:outline-level="3">Observation:</text:h>
      <text:p text:style-name="P21">AWS blocks public access by default for security purposes.<text:line-break/><text:line-break/><draw:frame draw:style-name="fr1" draw:name="Image4" text:anchor-type="char" svg:x="-0.397cm" svg:y="2.487cm" svg:width="17cm" svg:height="6.955cm" draw:z-index="4"><draw:image xlink:href="Pictures/100000010000054A0000022AD1EA9E42.png" xlink:type="simple" xlink:show="embed" xlink:actuate="onLoad" draw:mime-type="image/png"/></draw:frame><text:line-break/></text:p>
      <text:p text:style-name="P6"/>
      <text:h text:style-name="P14" text:outline-level="1">🛡️ <text:span text:style-name="T7">Permissions &amp; Bucket Policies</text:span></text:h>
      <text:p text:style-name="P21">Permissions in S3 control who can:</text:p>
      <text:list text:style-name="L6">
        <text:list-item>
          <text:p text:style-name="P22">Read files </text:p>
        </text:list-item>
        <text:list-item>
          <text:p text:style-name="P22">Upload files </text:p>
        </text:list-item>
        <text:list-item>
          <text:p text:style-name="P23"><text:soft-page-break/>Delete files </text:p>
        </text:list-item>
      </text:list>
      <text:h text:style-name="P24" text:outline-level="3">Bucket Policies</text:h>
      <text:p text:style-name="P21">Bucket policies are JSON-based rules used to manage access permissions.</text:p>
      <text:h text:style-name="P20" text:outline-level="3">Example Uses:</text:h>
      <text:list text:style-name="L7">
        <text:list-item>
          <text:p text:style-name="P25">Allow public read access </text:p>
        </text:list-item>
        <text:list-item>
          <text:p text:style-name="P26">Restrict access to specific users <text:line-break/><text:line-break/><draw:frame draw:style-name="fr1" draw:name="Image5" text:anchor-type="char" svg:x="0.243cm" svg:y="1.508cm" svg:width="16.249cm" svg:height="7.359cm" draw:z-index="5"><draw:image xlink:href="Pictures/100000010000054700000264C4150903.png" xlink:type="simple" xlink:show="embed" xlink:actuate="onLoad" draw:mime-type="image/png"/></draw:frame></text:p>
        </text:list-item>
      </text:list>
      <text:p text:style-name="P6"/>
      <text:h text:style-name="P14" text:outline-level="1">🔄 <text:span text:style-name="T7">File Versioning</text:span></text:h>
      <text:p text:style-name="P21">Versioning allows multiple versions of the same file to be stored.</text:p>
      <text:h text:style-name="P3" text:outline-level="2">Benefits:</text:h>
      <text:list text:style-name="L8">
        <text:list-item>
          <text:p text:style-name="P27">Recover deleted files </text:p>
        </text:list-item>
        <text:list-item>
          <text:p text:style-name="P27">Restore older versions </text:p>
        </text:list-item>
        <text:list-item>
          <text:p text:style-name="P28">Protect against accidental changes </text:p>
        </text:list-item>
      </text:list>
      <text:h text:style-name="P20" text:outline-level="3">Steps:</text:h>
      <text:list text:style-name="L9">
        <text:list-item>
          <text:p text:style-name="P29">Open bucket properties </text:p>
        </text:list-item>
        <text:list-item>
          <text:p text:style-name="P30">Enable Versioning</text:p>
        </text:list-item>
      </text:list>
      <text:p text:style-name="P31"><draw:frame draw:style-name="fr3" draw:name="Image6" text:anchor-type="char" svg:width="17cm" svg:height="6.53cm" draw:z-index="6"><draw:image xlink:href="Pictures/10000001000005540000020CBC780CD8.png" xlink:type="simple" xlink:show="embed" xlink:actuate="onLoad" draw:mime-type="image/png"/></draw:frame><draw:frame draw:style-name="fr1" draw:name="Image7" text:anchor-type="char" svg:x="0cm" svg:y="7.832cm" svg:width="17cm" svg:height="7.726cm" draw:z-index="7"><draw:image xlink:href="Pictures/10000001000005280000025850C82A24.png" xlink:type="simple" xlink:show="embed" xlink:actuate="onLoad" draw:mime-type="image/png"/></draw:frame><text:soft-page-break/><text:span text:style-name="T1"><text:line-break/><text:line-break/></text:span><text:span text:style-name="T3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18:38:22.679641400</meta:creation-date>
    <dc:date>2026-05-17T14:40:39.426852200</dc:date>
    <meta:editing-duration>P1DT20H8M3S</meta:editing-duration>
    <meta:editing-cycles>4</meta:editing-cycles>
    <meta:generator>LibreOffice/26.2.3.2$Windows_X86_64 LibreOffice_project/70e089b17412e4cb7773e41413306b17a2328c34</meta:generator>
    <meta:document-statistic meta:table-count="0" meta:image-count="7" meta:object-count="0" meta:page-count="5" meta:paragraph-count="47" meta:word-count="248" meta:character-count="1445" meta:non-whitespace-character-count="1221"/>
  </office:meta>
</office:document-meta>
</file>